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3.323cm" svg:x="11.668cm" svg:y="16.748cm">
          <text:p text:style-name="P1"><text:span text:style-name="T1">CPU MCS-48 family</text:span></text:p>
          <text:p text:style-name="P1"><text:span text:style-name="T1">8bit 6Mhz </text:span></text:p>
          <text:p text:style-name="P1"><text:span text:style-name="T1"/></text:p>
          <text:p text:style-name="P1"><text:span text:style-name="T1">P8035L</text:span></text:p>
          <text:p text:style-name="P1"><text:span text:style-name="T1">MO138</text:span></text:p>
          <text:p text:style-name="P1"><text:span text:style-name="T1">(c)INTEL'77</text:span></text:p>
          <text:p text:style-name="P1"><text:span text:style-name="T1"/></text:p>
          <text:p text:style-name="P1"><text:span text:style-name="T1">Package: DIP 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644cm" svg:height="4.826cm" svg:x="11.668cm" svg:y="20.939cm">
          <text:p text:style-name="P1"><text:span text:style-name="T1">EPROM 16Kbit (2Kx8)</text:span></text:p>
          <text:p text:style-name="P1"><text:span text:style-name="T1">3-State UV erasable</text:span></text:p>
          <text:p text:style-name="P1"><text:span text:style-name="T1"/></text:p>
          <text:p text:style-name="P1"><text:span text:style-name="T1">B2716-6</text:span></text:p>
          <text:p text:style-name="P1"><text:span text:style-name="T1">184F6-V</text:span></text:p>
          <text:p text:style-name="P1"><text:span text:style-name="T1"/></text:p>
          <text:p text:style-name="P1"><text:span text:style-name="T1">(c)INTEL'77</text:span></text:p>
          <text:p text:style-name="P1"><text:span text:style-name="T1"/></text:p>
          <text:p text:style-name="P1"><text:span text:style-name="T1">Package: DIP 24</text:span></text:p>
          <text:p text:style-name="P1"><text:span text:style-name="T1">VA2101</text:span></text:p>
          <text:p text:style-name="P1"><text:span text:style-name="T1">800</text:span></text:p>
          <text:p text:style-name="P1"><text:span text:style-name="T1">A98E H (hex?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644cm" svg:height="4.826cm" svg:x="18.007cm" svg:y="20.939cm">
          <text:p text:style-name="P1"><text:span text:style-name="T1">EPROM</text:span></text:p>
          <text:p text:style-name="P1"><text:span text:style-name="T1"/></text:p>
          <text:p text:style-name="P1"><text:span text:style-name="T1">B2716-6</text:span></text:p>
          <text:p text:style-name="P1"><text:span text:style-name="T1">184F6-V</text:span></text:p>
          <text:p text:style-name="P1"><text:span text:style-name="T1"/></text:p>
          <text:p text:style-name="P1"><text:span text:style-name="T1">(c)INTEL'77</text:span></text:p>
          <text:p text:style-name="P1"><text:span text:style-name="T1"/></text:p>
          <text:p text:style-name="P1"><text:span text:style-name="T1">Package: DIP 24</text:span></text:p>
          <text:p text:style-name="P1"><text:span text:style-name="T1">VA2101</text:span></text:p>
          <text:p text:style-name="P1"><text:span text:style-name="T1">0</text:span></text:p>
          <text:p text:style-name="P1"><text:span text:style-name="T1">3EF2 H (hex?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644cm" svg:height="2.982cm" svg:x="4.556cm" svg:y="18.211cm">
          <text:p text:style-name="P1"><text:span text:style-name="T1">Dual 4 bit latch (databus driver)</text:span></text:p>
          <text:p text:style-name="P1"><text:span text:style-name="T1"/></text:p>
          <text:p text:style-name="P1"><text:span text:style-name="T1">MC</text:span></text:p>
          <text:p text:style-name="P1"><text:span text:style-name="T1">14508BCL</text:span></text:p>
          <text:p text:style-name="P1"><text:span text:style-name="T1">M 78-07</text:span></text:p>
          <text:p text:style-name="P1"><text:span text:style-name="T1"/></text:p>
          <text:p text:style-name="P1"><text:span text:style-name="T1">Package: DIP 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644cm" svg:height="2.982cm" svg:x="4.556cm" svg:y="22.618cm">
          <text:p text:style-name="P1"><text:span text:style-name="T1">Dual 4 bit latch (databus driver)</text:span></text:p>
          <text:p text:style-name="P1"><text:span text:style-name="T1"/></text:p>
          <text:p text:style-name="P1"><text:span text:style-name="T1">MC</text:span></text:p>
          <text:p text:style-name="P1"><text:span text:style-name="T1">14508BCL</text:span></text:p>
          <text:p text:style-name="P1"><text:span text:style-name="T1">M 78-07</text:span></text:p>
          <text:p text:style-name="P1"><text:span text:style-name="T1"/></text:p>
          <text:p text:style-name="P1"><text:span text:style-name="T1">Package: DIP 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644cm" svg:height="2.982cm" svg:x="24.566cm" svg:y="12.496cm">
          <text:p text:style-name="P1"><text:span text:style-name="T1">8 Bit I/O expander</text:span></text:p>
          <text:p text:style-name="P1"><text:span text:style-name="T1"/></text:p>
          <text:p text:style-name="P1"><text:span text:style-name="T1">P8243</text:span></text:p>
          <text:p text:style-name="P1"><text:span text:style-name="T1">0487P</text:span></text:p>
          <text:p text:style-name="P1"><text:span text:style-name="T1">(c) INTEL'77</text:span></text:p>
          <text:p text:style-name="P1"><text:span text:style-name="T1"/></text:p>
          <text:p text:style-name="P1"><text:span text:style-name="T1">Package: DIP 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644cm" svg:height="2.982cm" svg:x="30.591cm" svg:y="22.656cm">
          <text:p text:style-name="P1"><text:span text:style-name="T1">8 Bit I/O expander</text:span></text:p>
          <text:p text:style-name="P1"><text:span text:style-name="T1"/></text:p>
          <text:p text:style-name="P1"><text:span text:style-name="T1">P8243</text:span></text:p>
          <text:p text:style-name="P1"><text:span text:style-name="T1">B0048</text:span></text:p>
          <text:p text:style-name="P1"><text:span text:style-name="T1">(c) INTEL'77</text:span></text:p>
          <text:p text:style-name="P1"><text:span text:style-name="T1"/></text:p>
          <text:p text:style-name="P1"><text:span text:style-name="T1">Package: DIP 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644cm" svg:height="2.982cm" svg:x="24.439cm" svg:y="5.384cm">
          <text:p text:style-name="P1"><text:span text:style-name="T1">8 Bit I/O expander</text:span></text:p>
          <text:p text:style-name="P1"><text:span text:style-name="T1"/></text:p>
          <text:p text:style-name="P1"><text:span text:style-name="T1">P8243</text:span></text:p>
          <text:p text:style-name="P1"><text:span text:style-name="T1">B0010</text:span></text:p>
          <text:p text:style-name="P1"><text:span text:style-name="T1">(c) INTEL'77</text:span></text:p>
          <text:p text:style-name="P1"><text:span text:style-name="T1"/></text:p>
          <text:p text:style-name="P1"><text:span text:style-name="T1">Package: DIP 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644cm" svg:height="1.651cm" svg:x="8.874cm" svg:y="11.541cm">
          <text:p text:style-name="P1"><text:span text:style-name="T1">Dual type D Flip-Flop</text:span></text:p>
          <text:p text:style-name="P1"><text:span text:style-name="T1">MC14013BC</text:span></text:p>
          <text:p text:style-name="P1"><text:span text:style-name="T1">LDM80 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644cm" svg:height="1.651cm" svg:x="8.874cm" svg:y="13.7cm">
          <text:p text:style-name="P1"><text:span text:style-name="T1">Dual 4 input NAND Gate</text:span></text:p>
          <text:p text:style-name="P1"><text:span text:style-name="T1">MC14012BAL</text:span></text:p>
          <text:p text:style-name="P1"><text:span text:style-name="T1">M 79 4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644cm" svg:height="1.651cm" svg:x="15.168cm" svg:y="13.7cm">
          <text:p text:style-name="P1"><text:span text:style-name="T1">12-Bit binary counter</text:span></text:p>
          <text:p text:style-name="P1"><text:span text:style-name="T1">MC14040BA</text:span></text:p>
          <text:p text:style-name="P1"><text:span text:style-name="T1">LDM80 17</text:span></text:p>
          <draw:enhanced-geometry svg:viewBox="0 0 21600 21600" draw:type="rectangle" draw:enhanced-path="M 0 0 L 21600 0 21600 21600 0 21600 0 0 Z N"/>
        </draw:custom-shape>
        <draw:frame draw:style-name="gr2" draw:layer="layout" svg:width="9.968cm" svg:height="0.962cm" svg:x="15.351cm" svg:y="1.889cm">
          <draw:text-box>
            <text:p>Latest manuf. Date 1980 week 18</text:p>
          </draw:text-box>
        </draw:frame>
        <draw:custom-shape draw:style-name="gr1" draw:text-style-name="P2" draw:layer="layout" svg:width="2.977cm" svg:height="2.286cm" svg:x="3.667cm" svg:y="2.397cm">
          <text:p text:style-name="P1"><text:span text:style-name="T1">Optoisolated </text:span></text:p>
          <text:p text:style-name="P1"><text:span text:style-name="T1">transistor output</text:span></text:p>
          <text:p text:style-name="P1"><text:span text:style-name="T1">4N26</text:span></text:p>
          <text:p text:style-name="P1"><text:span text:style-name="T1">005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644cm" svg:height="2.982cm" svg:x="10.525cm" svg:y="5.384cm">
          <text:p text:style-name="P1"><text:span text:style-name="T1">8 Bit I/O expander</text:span></text:p>
          <text:p text:style-name="P1"><text:span text:style-name="T1"/></text:p>
          <text:p text:style-name="P1"><text:span text:style-name="T1">P8243</text:span></text:p>
          <text:p text:style-name="P1"><text:span text:style-name="T1">B0010</text:span></text:p>
          <text:p text:style-name="P1"><text:span text:style-name="T1">(c) INTEL'77</text:span></text:p>
          <text:p text:style-name="P1"><text:span text:style-name="T1"/></text:p>
          <text:p text:style-name="P1"><text:span text:style-name="T1">Package: DIP 24</text:span></text:p>
          <draw:enhanced-geometry svg:viewBox="0 0 21600 21600" draw:type="rectangle" draw:enhanced-path="M 0 0 L 21600 0 21600 21600 0 21600 0 0 Z N"/>
        </draw:custom-shape>
        <draw:frame draw:style-name="gr2" draw:layer="layout" svg:width="10.484cm" svg:height="3.095cm" svg:x="18.78cm" svg:y="16.875cm">
          <draw:text-box>
            <text:p>Max 4KB external program memory</text:p>
            <text:p>64x8 bit on chip ram, </text:p>
            <text:p>256 byte external ram</text:p>
            <text:p>DASMx disassemble availab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6T21:41:44.849995426</meta:creation-date>
    <dc:date>2014-03-06T22:54:19.781026214</dc:date>
    <meta:editing-duration>PT29M2S</meta:editing-duration>
    <meta:editing-cycles>4</meta:editing-cycles>
    <meta:generator>LibreOffice/4.1.5.3$Linux_X86_64 LibreOffice_project/410m0$Build-3</meta:generator>
    <meta:document-statistic meta:object-count="15"/>
  </office:meta>
</office:document-meta>
</file>